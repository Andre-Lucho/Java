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41137" officeooo:paragraph-rsid="0014113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1ab42" officeooo:paragraph-rsid="0011ab4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41137" officeooo:paragraph-rsid="0014113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760df" officeooo:paragraph-rsid="001760df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41137"/>
    </style:style>
    <style:style style:name="P6" style:family="paragraph" style:parent-style-name="Standard">
      <style:text-properties officeooo:rsid="00141137" officeooo:paragraph-rsid="00141137"/>
    </style:style>
    <style:style style:name="P7" style:family="paragraph" style:parent-style-name="Standard">
      <style:text-properties fo:font-size="14pt" fo:font-weight="bold" officeooo:rsid="0015e99b" officeooo:paragraph-rsid="0014113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5e99b" officeooo:paragraph-rsid="0015e99b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officeooo:rsid="0015e99b" officeooo:paragraph-rsid="0015e99b" style:font-weight-asian="bold" style:font-weight-complex="bold"/>
    </style:style>
    <style:style style:name="P10" style:family="paragraph" style:parent-style-name="Standard">
      <style:text-properties officeooo:rsid="0015e99b" officeooo:paragraph-rsid="0015e99b"/>
    </style:style>
    <style:style style:name="P11" style:family="paragraph" style:parent-style-name="Standard">
      <style:text-properties fo:font-weight="normal" officeooo:rsid="0015e99b" officeooo:paragraph-rsid="0015e99b" style:font-weight-asian="normal" style:font-weight-complex="normal"/>
    </style:style>
    <style:style style:name="T1" style:family="text">
      <style:text-properties officeooo:rsid="001749a7"/>
    </style:style>
    <style:style style:name="T2" style:family="text">
      <style:text-properties officeooo:rsid="00184da0"/>
    </style:style>
    <style:style style:name="T3" style:family="text">
      <style:text-properties fo:font-weight="bold" officeooo:rsid="0014113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áveis</text:p>
      <text:p text:style-name="P2"/>
      <text:p text:style-name="P3">Nome dado a uma posição na memória do computador <text:span text:style-name="T1">que irá armazenar um valor e que pode ser alterado.</text:span></text:p>
      <text:p text:style-name="P3"/>
      <text:p text:style-name="P4">Tipo de nomeação <text:span text:style-name="T2">de variável </text:span>em Phyton = snake_case</text:p>
      <text:p text:style-name="P4"/>
      <text:p text:style-name="P5"><text:span text:style-name="T3">Tipos de dados</text:span></text:p>
      <text:p text:style-name="P6"/>
      <text:p text:style-name="P6">Dependendo do tipo de dados, alocamos + ou – espaço na memória</text:p>
      <text:p text:style-name="P7"/>
      <text:p text:style-name="P8"/>
      <text:p text:style-name="P8">Paradigmas de programação</text:p>
      <text:p text:style-name="P8"/>
      <text:p text:style-name="P9">Estruturado – linha a linha</text:p>
      <text:p text:style-name="P10">Sequência – seleção - iteração</text:p>
      <text:p text:style-name="P10"/>
      <text:p text:style-name="P9">Orientada a objetos</text:p>
      <text:p text:style-name="P11">Criação de classes</text:p>
      <text:p text:style-name="P11">Divisão do sistema em módulos – iteração entre os módul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5:36:47.076461241</meta:creation-date>
    <dc:date>2026-03-05T20:01:17.408782729</dc:date>
    <meta:editing-duration>PT1H27M14S</meta:editing-duration>
    <meta:editing-cycles>7</meta:editing-cycles>
    <meta:generator>LibreOffice/25.8.5.2$Linux_X86_64 LibreOffice_project/580$Build-2</meta:generator>
    <meta:document-statistic meta:table-count="0" meta:image-count="0" meta:object-count="0" meta:page-count="1" meta:paragraph-count="11" meta:word-count="69" meta:character-count="412" meta:non-whitespace-character-count="350"/>
  </office:meta>
</office:document-meta>
</file>