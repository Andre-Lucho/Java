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03020" officeooo:paragraph-rsid="00003020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03020" officeooo:paragraph-rsid="00003020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fo:font-size="12pt" style:text-underline-style="none" fo:font-weight="normal" officeooo:rsid="00003020" officeooo:paragraph-rsid="00003020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03020" officeooo:paragraph-rsid="00003020" style:font-size-asian="12pt" style:font-weight-asian="normal" style:font-size-complex="12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fo:font-size="12pt" style:text-underline-style="none" fo:font-weight="normal" officeooo:rsid="00003020" officeooo:paragraph-rsid="00003020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style:text-underline-style="none" fo:font-weight="normal" officeooo:rsid="00003020" officeooo:paragraph-rsid="00003020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3pt" style:text-underline-style="none" fo:font-weight="bold" officeooo:rsid="00003020" officeooo:paragraph-rsid="0005187d" style:font-size-asian="13pt" style:font-weight-asian="bold" style:font-size-complex="13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style:text-underline-style="none" fo:font-weight="normal" officeooo:rsid="00003020" officeooo:paragraph-rsid="0005187d" style:font-size-asian="12pt" style:font-weight-asian="normal" style:font-size-complex="12pt" style:font-weight-complex="normal"/>
    </style:style>
    <style:style style:name="P9" style:family="paragraph" style:parent-style-name="Standard" style:list-style-name="L1" style:master-page-name="">
      <loext:graphic-properties draw:fill="none"/>
      <style:paragraph-properties fo:margin-left="0cm" fo:margin-right="0cm" fo:text-indent="-0.499cm" style:auto-text-indent="false" style:page-number="auto" fo:background-color="transparent"/>
      <style:text-properties fo:font-size="12pt" style:text-underline-style="none" fo:font-weight="normal" officeooo:rsid="00003020" officeooo:paragraph-rsid="00003020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bold" officeooo:rsid="00003020" officeooo:paragraph-rsid="00003020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normal" officeooo:rsid="00003020" officeooo:paragraph-rsid="00003020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bold" officeooo:rsid="00003020" officeooo:paragraph-rsid="0001250c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none" fo:font-weight="normal" officeooo:rsid="00003020" officeooo:paragraph-rsid="0001250c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014323" officeooo:paragraph-rsid="00014323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bold" officeooo:rsid="00003020" officeooo:paragraph-rsid="00014323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none" fo:font-weight="normal" officeooo:rsid="00003020" officeooo:paragraph-rsid="00014323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3pt" style:text-underline-style="none" fo:font-weight="bold" officeooo:rsid="00068c14" officeooo:paragraph-rsid="00068c14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2pt" style:text-underline-style="none" fo:font-weight="normal" officeooo:rsid="00068c14" officeooo:paragraph-rsid="00068c14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2pt" style:text-underline-style="none" fo:font-weight="normal" officeooo:rsid="00068c14" officeooo:paragraph-rsid="00068c14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officeooo:paragraph-rsid="00068c14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rsid="0011ab42" officeooo:paragraph-rsid="00090250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1ab42" officeooo:paragraph-rsid="00090250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normal" officeooo:rsid="0011ab42" officeooo:paragraph-rsid="00090250" style:font-size-asian="14pt" style:font-weight-asian="normal" style:font-size-complex="14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>
        <style:tab-stops>
          <style:tab-stop style:position="0cm"/>
        </style:tab-stops>
      </style:paragraph-properties>
      <style:text-properties fo:font-size="12pt" fo:font-weight="normal" officeooo:rsid="0011ab42" officeooo:paragraph-rsid="00090250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>
        <style:tab-stops>
          <style:tab-stop style:position="0cm"/>
        </style:tab-stops>
      </style:paragraph-properties>
      <style:text-properties fo:font-size="12pt" fo:font-weight="bold" officeooo:rsid="0011ab42" officeooo:paragraph-rsid="00090250" style:font-size-asian="12pt" style:font-weight-asian="bold" style:font-size-complex="12pt" style:font-weight-complex="bold"/>
    </style:style>
    <style:style style:name="P26" style:family="paragraph" style:parent-style-name="Standard">
      <style:text-properties officeooo:rsid="0011ab42" officeooo:paragraph-rsid="00090250"/>
    </style:style>
    <style:style style:name="P27" style:family="paragraph" style:parent-style-name="Standard" style:list-style-name="L2">
      <style:text-properties officeooo:rsid="0011ab42" officeooo:paragraph-rsid="00090250"/>
    </style:style>
    <style:style style:name="P28" style:family="paragraph" style:parent-style-name="Standard">
      <style:text-properties officeooo:paragraph-rsid="00090250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315ac" officeooo:paragraph-rsid="00090250" style:font-weight-asian="bold" style:font-weight-complex="bold"/>
    </style:style>
    <style:style style:name="P30" style:family="paragraph" style:parent-style-name="Standard">
      <style:text-properties style:text-underline-style="none" fo:font-weight="normal" officeooo:rsid="001315ac" officeooo:paragraph-rsid="00090250" style:font-weight-asian="normal" style:font-weight-complex="normal"/>
    </style:style>
    <style:style style:name="P31" style:family="paragraph" style:parent-style-name="Standard">
      <style:text-properties officeooo:rsid="001315ac" officeooo:paragraph-rsid="00090250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paragraph-rsid="00090250" style:font-weight-asian="bold" style:font-weight-complex="bold"/>
    </style:style>
    <style:style style:name="T1" style:family="text">
      <style:text-properties officeooo:rsid="0005187d"/>
    </style:style>
    <style:style style:name="T2" style:family="text">
      <style:text-properties officeooo:rsid="0001250c"/>
    </style:style>
    <style:style style:name="T3" style:family="text">
      <style:text-properties officeooo:rsid="00014323"/>
    </style:style>
    <style:style style:name="T4" style:family="text">
      <style:text-properties officeooo:rsid="000789c1"/>
    </style:style>
    <style:style style:name="T5" style:family="text">
      <style:text-properties fo:font-size="12pt" style:text-underline-style="none" fo:font-weight="normal" officeooo:rsid="00068c14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003020" style:font-size-asian="12pt" style:font-weight-asian="normal" style:font-size-complex="12pt" style:font-weight-complex="normal"/>
    </style:style>
    <style:style style:name="T7" style:family="text">
      <style:text-properties officeooo:rsid="001315a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eitos Básicos</text:p>
      <text:p text:style-name="P2"/>
      <text:list text:style-name="L1">
        <text:list-item>
          <text:p text:style-name="P3">Instrução → comando ou regra indicando quais dados devem ser operados e qual operação a se realizar</text:p>
        </text:list-item>
      </text:list>
      <text:p text:style-name="P4"/>
      <text:p text:style-name="P5">Passamos as instruções a serem executadas pelo computador através das linguagens de programação:</text:p>
      <text:p text:style-name="P6"/>
      <text:p text:style-name="P6">Linguagem de alto nível → linguagem de máquina</text:p>
      <text:p text:style-name="P6"/>
      <text:p text:style-name="P7"><text:span text:style-name="T1">a.</text:span> Linguagem de alto nível</text:p>
      <text:p text:style-name="P8"/>
      <text:list text:continue-numbering="true" text:style-name="L1">
        <text:list-item>
          <text:p text:style-name="P3">Tipo de linguagem criada para facilitar a comunicação com a máquina. São voltadas para o ser humano. </text:p>
        </text:list-item>
        <text:list-item>
          <text:p text:style-name="P3">Em geral, utilizam sintaxe estruturada tornando seu código mais legível. </text:p>
        </text:list-item>
        <text:list-item>
          <text:p text:style-name="P3">Necessitam de compiladores ou interpretadores para gerar instruções ao processador.</text:p>
        </text:list-item>
        <text:list-item>
          <text:p text:style-name="P3">Devem ser traduzidas em linguagem de máquina.</text:p>
        </text:list-item>
        <text:list-item>
          <text:p text:style-name="P3">Mais lenta</text:p>
        </text:list-item>
        <text:list-item>
          <text:p text:style-name="P3">Não é necessário Build</text:p>
        </text:list-item>
        <text:list-item>
          <text:p text:style-name="P3">JIT (Just in Time)</text:p>
        </text:list-item>
        <text:list-item>
          <text:p text:style-name="P3">Exs.: JavaScript, PHP, Python</text:p>
        </text:list-item>
      </text:list>
      <text:p text:style-name="P6"/>
      <text:p text:style-name="P7">b. <text:span text:style-name="T1">L</text:span>inguagem de máquina</text:p>
      <text:p text:style-name="P8"/>
      <text:list text:continue-numbering="true" text:style-name="L1">
        <text:list-item>
          <text:p text:style-name="P3">Tipo mais primitivo de linguagem. </text:p>
        </text:list-item>
        <text:list-item>
          <text:p text:style-name="P3">É a linguagem que o computador entende, mais próximas ao hardware do computador. </text:p>
        </text:list-item>
        <text:list-item>
          <text:p text:style-name="P3">São compostas por instruções que facilmente serão compreendidas pelo computador, mas que são difíceis para os humanos entenderem.</text:p>
        </text:list-item>
        <text:list-item>
          <text:p text:style-name="P3">Mais rápidas e eficientes</text:p>
        </text:list-item>
        <text:list-item>
          <text:p text:style-name="P3">Necessário Build</text:p>
        </text:list-item>
        <text:list-item>
          <text:p text:style-name="P3">Exs.: C, C++, Rust</text:p>
        </text:list-item>
      </text:list>
      <text:p text:style-name="P4"/>
      <text:list text:continue-numbering="true" text:style-name="L1">
        <text:list-header>
          <text:p text:style-name="P3"/>
          <text:p text:style-name="P9">O Processo de tradução de um tipo de linguagem para outro pode ser feito através de 2 principais modos: por interpretação ou por compilação</text:p>
        </text:list-header>
      </text:list>
      <text:p text:style-name="P4"/>
      <text:p text:style-name="P4"/>
      <text:p text:style-name="P2">Linguagem Interpretada x linguagem compilada</text:p>
      <text:p text:style-name="P10"/>
      <text:p text:style-name="P11"/>
      <text:p text:style-name="P12"><text:span text:style-name="T2">1. </text:span>Linguagem Interpretada</text:p>
      <text:p text:style-name="P12"/>
      <text:p text:style-name="P13">Um interpretador é um programa que recebe como entrada um arquivo contendo um programa fonte.</text:p>
      <text:p text:style-name="P13">O interpretador lê linha a linha este arquivo de entrada, e executa uma a uma as instruções que estão nele programadas</text:p>
      <text:p text:style-name="P13"/>
      <text:p text:style-name="P14">Desvantagens:</text:p>
      <text:list text:continue-numbering="true" text:style-name="L1">
        <text:list-item>
          <text:p text:style-name="P3">É relativamente lenta;</text:p>
        </text:list-item>
        <text:list-item>
          <text:p text:style-name="P3">Se houver algum erro de no código, o programa será interrompido</text:p>
        </text:list-item>
      </text:list>
      <text:p text:style-name="P4"/>
      <text:p text:style-name="P15"/>
      <text:p text:style-name="P15"><text:soft-page-break/><text:span text:style-name="T3">2</text:span><text:span text:style-name="T2">. </text:span>Linguagem <text:span text:style-name="T3">C</text:span>ompilada</text:p>
      <text:p text:style-name="P15"/>
      <text:p text:style-name="P16">Um compilador é um programa (ou um conjunto de programas) que recebe como entrada um programa fonte e cria um novo arquivo como saída:</text:p>
      <text:p text:style-name="P15"/>
      <text:list text:continue-numbering="true" text:style-name="L1">
        <text:list-item>
          <text:p text:style-name="P3">O arquivo de entrada é o código fonte escrito pelo programador;</text:p>
        </text:list-item>
        <text:list-item>
          <text:p text:style-name="P3">O arquivo que o compilador produz, é normalmente identificado como código objeto - Este código objeto contém instruções de baixo nível, traduzidas para a linguagem de máquina</text:p>
        </text:list-item>
      </text:list>
      <text:p text:style-name="P4"/>
      <text:list text:continue-numbering="true" text:style-name="L1">
        <text:list-item>
          <text:p text:style-name="P3">O código produzido não é portável para qualquer arquitetura → <text:span text:style-name="T4">d</text:span>iferentes compiladores são construídos para as diferentes arquiteturas de processadores (diferentes famílias de</text:p>
        </text:list-item>
        <text:list-item>
          <text:p text:style-name="P3">processadores possuem conjuntos diferentes de instruções)</text:p>
          <text:p text:style-name="P3"/>
        </text:list-item>
        <text:list-item>
          <text:p text:style-name="P3">O compilador somente gera corretamente o código objeto caso não tenha encontrado um erro de compilação</text:p>
        </text:list-item>
      </text:list>
      <text:p text:style-name="P4"/>
      <text:p text:style-name="P17"/>
      <text:p text:style-name="P17">Linguagem Java</text:p>
      <text:p text:style-name="P17"/>
      <text:p text:style-name="P18">Java é uma linguagem compilada → o compilador Java, entretanto, não gera código para um processador específico, mas sim para uma máquina virtual Java (JVM - Java Virtual Machine)</text:p>
      <text:p text:style-name="P18"/>
      <text:p text:style-name="P18">Códigos em Java são portáveis sobre todos os computadores para os quais existir uma implementação da JVM</text:p>
      <text:p text:style-name="P18"/>
      <text:list text:continue-numbering="true" text:style-name="L1">
        <text:list-header>
          <text:p text:style-name="P19">Desta forma, Java possui tanto benefícios característicos:</text:p>
        </text:list-header>
        <text:list-item>
          <text:p text:style-name="P20"><text:span text:style-name="T5"><text:s/>linguagens compiladas →uma vez que </text:span><text:span text:style-name="T6">a execução de um programa não corre o risco de ser abortada devido a um erro de sintaxe no seu código</text:span></text:p>
          <text:p text:style-name="P3"/>
        </text:list-item>
        <text:list-item>
          <text:p text:style-name="P3">linguagens interpretadas → uma vez que executa sobre uma máquina virtual que tem um comportamento semelhante a um interpretador</text:p>
        </text:list-item>
      </text:list>
      <text:p text:style-name="P4"/>
      <text:p text:style-name="P4"/>
      <text:p text:style-name="P4"/>
      <text:p text:style-name="P21">Algoritmos</text:p>
      <text:p text:style-name="P22"/>
      <text:p text:style-name="P23">(algoritmo = pop, <text:span text:style-name="T7">receita, sequência de instruções</text:span>)</text:p>
      <text:p text:style-name="P22"/>
      <text:p text:style-name="P22"/>
      <text:p text:style-name="P24">Um algoritmo é uma sequência de passos finita, que devem ser seguidos para alcançar algum objetivo → para ordenar ao computador que realize uma determinada tarefa <text:s/><text:span text:style-name="T7">=</text:span></text:p>
      <text:p text:style-name="P25">um algoritmo é descrito em uma linguagem de programação:</text:p>
      <text:p text:style-name="P26"/>
      <text:list text:style-name="L2">
        <text:list-item>
          <text:p text:style-name="P27">Este algoritmo é, então, compilado (ou interpretado) e executado.</text:p>
        </text:list-item>
      </text:list>
      <text:p text:style-name="P28"/>
      <text:p text:style-name="P28"/>
      <text:p text:style-name="P29">Fases/Partes de um algoritmo – Dividi-lo em 3 fases</text:p>
      <text:p text:style-name="P29"/>
      <text:p text:style-name="P30">1. Entrada → <text:s/>2. Processamento → 3. Saída</text:p>
      <text:p text:style-name="P29"/>
      <text:p text:style-name="P30">1. Dados de entrada do algoritmo;</text:p>
      <text:p text:style-name="P30"><text:soft-page-break/>2. Procedimentos utilizados para se chegar ao resultado final;</text:p>
      <text:p text:style-name="P30">3. Dados processados</text:p>
      <text:p text:style-name="P29"/>
      <text:p text:style-name="P31"/>
      <text:p text:style-name="P28"/>
      <text:p text:style-name="P28"/>
      <text:p text:style-name="P32">Formas de representação de um algoritmo</text:p>
      <text:p text:style-name="P28"/>
      <text:p text:style-name="P28">Representam o algoritmo no nível lógico:</text:p>
      <text:list text:continue-numbering="true" text:style-name="L2">
        <text:list-item>
          <text:p text:style-name="P27">abstrai detalhes referentes ao código</text:p>
        </text:list-item>
        <text:list-item>
          <text:p text:style-name="P27">não é ligado a alguma linguagem</text:p>
        </text:list-item>
      </text:list>
      <text:p text:style-name="P26"/>
      <text:p text:style-name="P26">Exs.:</text:p>
      <text:p text:style-name="P28">• Fluxograma</text:p>
      <text:p text:style-name="P28">• Pseudocódigo (português estruturado)</text:p>
      <text:p text:style-name="P28">• Descritiva (narração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1:19:36.659371201</meta:creation-date>
    <dc:date>2026-03-03T10:58:09.556134756</dc:date>
    <meta:editing-duration>PT2H29M52S</meta:editing-duration>
    <meta:editing-cycles>7</meta:editing-cycles>
    <meta:generator>LibreOffice/25.8.5.2$Linux_X86_64 LibreOffice_project/580$Build-2</meta:generator>
    <meta:document-statistic meta:table-count="0" meta:image-count="0" meta:object-count="0" meta:page-count="3" meta:paragraph-count="62" meta:word-count="598" meta:character-count="3663" meta:non-whitespace-character-count="3148"/>
  </office:meta>
</office:document-meta>
</file>